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-BoldMT" svg:font-family="Arial-BoldMT"/>
    <style:font-face style:name="CanelaText-Bold" svg:font-family="CanelaText-Bold"/>
    <style:font-face style:name="CanelaText-Medium" svg:font-family="CanelaText-Medium"/>
    <style:font-face style:name="CanelaText-Regular" svg:font-family="CanelaText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0555in" style:contextual-spacing="false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.1252in" fo:margin-bottom="0.028in" style:contextual-spacing="false" fo:text-align="start" style:justify-single-word="false" fo:orphans="2" fo:widows="2" fo:text-indent="0in" style:auto-text-indent="false" fo:padding="0in" fo:border-left="none" fo:border-right="none" fo:border-top="none" fo:border-bottom="0.99pt solid #000000" fo:keep-with-next="always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50%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11in" style:contextual-spacing="false" fo:line-height="50%" fo:text-align="start" style:justify-single-word="false" fo:orphans="2" fo:widows="2" fo:text-indent="0in" style:auto-text-indent="false" fo:padding="0in" fo:border-left="none" fo:border-right="none" fo:border-top="none" fo:border-bottom="0.99pt dashed #000000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30%" fo:text-align="start" style:justify-single-word="false" fo:orphans="2" fo:widows="2" fo:text-indent="0in" style:auto-text-indent="false"/>
    </style:style>
    <style:style style:name="P8" style:family="paragraph" style:parent-style-name="Standard" style:master-page-name="PM2">
      <style:paragraph-properties fo:margin-left="0in" fo:margin-right="0in" fo:margin-top="0in" fo:margin-bottom="0.0555in" style:contextual-spacing="false" fo:text-align="center" style:justify-single-word="false" fo:orphans="2" fo:widows="2" fo:text-indent="0in" style:auto-text-indent="false" style:page-number="auto"/>
    </style:style>
    <style:style style:name="P9" style:family="paragraph" style:parent-style-name="Standard">
      <style:paragraph-properties fo:margin-left="0in" fo:margin-right="0in" fo:margin-top="0in" fo:margin-bottom="0.111in" style:contextual-spacing="false" fo:line-height="30%" fo:text-align="start" style:justify-single-word="false" fo:orphans="2" fo:widows="2" fo:text-indent="0in" style:auto-text-indent="false"/>
      <style:text-properties fo:color="#000000" loext:opacity="100%" style:font-name="CanelaText-Regular" fo:font-size="10pt" fo:language="en" fo:country="US" style:font-name-asian="CanelaText-Regular" style:font-size-asian="10pt" style:font-name-complex="CanelaText-Regular" style:font-size-complex="10pt"/>
    </style:style>
    <style:style style:name="P10" style:family="paragraph" style:parent-style-name="Standard" style:list-style-name="L3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  <style:text-properties fo:color="#000000" loext:opacity="100%" style:font-name="CanelaText-Regular" fo:font-size="10pt" fo:language="en" fo:country="US" style:font-name-asian="CanelaText-Regular" style:font-size-asian="10pt" style:font-name-complex="CanelaText-Regular" style:font-size-complex="10pt"/>
    </style:style>
    <style:style style:name="P11" style:family="paragraph" style:parent-style-name="Standard" style:list-style-name="L4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  <style:text-properties fo:color="#000000" loext:opacity="100%" style:font-name="CanelaText-Regular" fo:font-size="10pt" fo:language="en" fo:country="US" style:font-name-asian="CanelaText-Regular" style:font-size-asian="10pt" style:font-name-complex="CanelaText-Regular" style:font-size-complex="10pt"/>
    </style:style>
    <style:style style:name="P12" style:family="paragraph" style:parent-style-name="Standard" style:list-style-name="L5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  <style:text-properties fo:color="#000000" loext:opacity="100%" style:font-name="CanelaText-Regular" fo:font-size="10pt" fo:language="en" fo:country="US" style:font-name-asian="CanelaText-Regular" style:font-size-asian="10pt" style:font-name-complex="CanelaText-Regular" style:font-size-complex="10pt"/>
    </style:style>
    <style:style style:name="P13" style:family="paragraph" style:parent-style-name="Standard">
      <style:paragraph-properties fo:margin-left="0in" fo:margin-right="0in" fo:margin-top="0in" fo:margin-bottom="0.111in" style:contextual-spacing="false" fo:line-height="30%" fo:text-align="start" style:justify-single-word="false" fo:orphans="2" fo:widows="2" fo:text-indent="0in" style:auto-text-indent="false"/>
      <style:text-properties fo:color="#000000" loext:opacity="100%" style:font-name="CanelaText-Regular" fo:font-size="8pt" fo:language="en" fo:country="US" style:font-name-asian="CanelaText-Regular" style:font-size-asian="8pt" style:font-name-complex="CanelaText-Regular" style:font-size-complex="8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CanelaText-Medium" fo:font-size="11pt" fo:language="en" fo:country="US" style:font-name-asian="CanelaText-Medium" style:font-size-asian="11pt" style:font-name-complex="CanelaText-Medium" style:font-size-complex="11pt"/>
    </style:style>
    <style:style style:name="P15" style:family="paragraph" style:parent-style-name="Standard">
      <style:paragraph-properties fo:margin-left="0in" fo:margin-right="0in" fo:margin-top="0.1252in" fo:margin-bottom="0.028in" style:contextual-spacing="false" fo:text-align="start" style:justify-single-word="false" fo:orphans="2" fo:widows="2" fo:text-indent="0in" style:auto-text-indent="false" fo:padding="0in" fo:border-left="none" fo:border-right="none" fo:border-top="none" fo:border-bottom="0.99pt solid #000000"/>
      <style:text-properties fo:text-transform="uppercase" fo:color="#000000" loext:opacity="100%" style:font-name="CanelaText-Bold" fo:font-size="11pt" fo:language="en" fo:country="US" fo:font-weight="bold" style:font-name-asian="CanelaText-Bold" style:font-size-asian="11pt" style:font-weight-asian="bold" style:font-name-complex="CanelaText-Bold" style:font-size-complex="11pt" style:font-weight-complex="bold"/>
    </style:style>
    <style:style style:name="P16" style:family="paragraph" style:parent-style-name="Standard">
      <style:paragraph-properties fo:margin-left="0in" fo:margin-right="0in" fo:margin-top="0.1252in" fo:margin-bottom="0.028in" style:contextual-spacing="false" fo:text-align="start" style:justify-single-word="false" fo:orphans="2" fo:widows="2" fo:text-indent="0in" style:auto-text-indent="false" fo:padding="0in" fo:border-left="none" fo:border-right="none" fo:border-top="none" fo:border-bottom="0.99pt solid #000000" fo:keep-with-next="always"/>
      <style:text-properties fo:text-transform="uppercase" fo:color="#000000" loext:opacity="100%" style:font-name="CanelaText-Bold" fo:font-size="11pt" fo:language="en" fo:country="US" fo:font-weight="bold" officeooo:paragraph-rsid="0006284a" style:font-name-asian="CanelaText-Bold" style:font-size-asian="11pt" style:font-weight-asian="bold" style:font-name-complex="CanelaText-Bold" style:font-size-complex="11pt" style:font-weight-complex="bold"/>
    </style:style>
    <style:style style:name="P17" style:family="paragraph" style:parent-style-name="Standard">
      <style:paragraph-properties fo:margin-left="0in" fo:margin-right="0in" fo:margin-top="0.1252in" fo:margin-bottom="0.028in" style:contextual-spacing="false" fo:text-align="start" style:justify-single-word="false" fo:orphans="2" fo:widows="2" fo:text-indent="0in" style:auto-text-indent="false" fo:padding="0in" fo:border-left="none" fo:border-right="none" fo:border-top="none" fo:border-bottom="0.99pt solid #000000" fo:keep-with-next="always"/>
      <style:text-properties fo:text-transform="uppercase" fo:color="#000000" loext:opacity="100%" style:font-name="CanelaText-Bold" fo:font-size="9pt" fo:language="en" fo:country="US" fo:font-weight="bold" officeooo:paragraph-rsid="000bf517" style:font-name-asian="CanelaText-Bold" style:font-size-asian="9pt" style:font-weight-asian="bold" style:font-name-complex="CanelaText-Bold" style:font-size-complex="9pt" style:font-weight-complex="bold"/>
    </style:style>
    <style:style style:name="P18" style:family="paragraph" style:parent-style-name="Standard">
      <style:paragraph-properties fo:margin-left="0in" fo:margin-right="0in" fo:margin-top="0.1252in" fo:margin-bottom="0.028in" style:contextual-spacing="false" fo:text-align="start" style:justify-single-word="false" fo:orphans="2" fo:widows="2" fo:text-indent="0in" style:auto-text-indent="false" fo:padding="0in" fo:border-left="none" fo:border-right="none" fo:border-top="none" fo:border-bottom="0.99pt solid #000000" fo:keep-with-next="always"/>
      <style:text-properties fo:text-transform="uppercase" fo:color="#000000" loext:opacity="100%" style:font-name="CanelaText-Bold" fo:font-size="10pt" fo:language="en" fo:country="US" fo:font-weight="normal" officeooo:rsid="00093345" officeooo:paragraph-rsid="00093345" style:font-name-asian="CanelaText-Bold" style:font-size-asian="10pt" style:font-weight-asian="normal" style:font-name-complex="CanelaText-Bold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  <style:text-properties officeooo:paragraph-rsid="0006284a"/>
    </style:style>
    <style:style style:name="P20" style:family="paragraph" style:parent-style-name="Standard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</style:style>
    <style:style style:name="P21" style:family="paragraph" style:parent-style-name="Standard" style:list-style-name="L3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111in" style:contextual-spacing="false" fo:line-height="30%" fo:text-align="start" style:justify-single-word="false" fo:orphans="2" fo:widows="2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.0717in" style:contextual-spacing="false" fo:line-height="100%" fo:text-align="start" style:justify-single-word="false" fo:orphans="2" fo:widows="2" fo:text-indent="0in" style:auto-text-indent="false"/>
      <style:text-properties officeooo:rsid="0006284a" officeooo:paragraph-rsid="0006284a"/>
    </style:style>
    <style:style style:name="P24" style:family="paragraph" style:parent-style-name="Standard">
      <style:paragraph-properties fo:margin-left="0in" fo:margin-right="0in" fo:margin-top="0in" fo:margin-bottom="0.111in" style:contextual-spacing="false" fo:line-height="30%" fo:text-align="start" style:justify-single-word="false" fo:orphans="2" fo:widows="2" fo:text-indent="0in" style:auto-text-indent="false"/>
      <style:text-properties fo:font-size="8pt" style:font-size-asian="8pt" style:font-size-complex="8pt"/>
    </style:style>
    <style:style style:name="T1" style:family="text">
      <style:text-properties fo:color="#000000" loext:opacity="100%" style:font-name="Arial-BoldMT" fo:font-size="20pt" fo:language="en" fo:country="US" fo:font-weight="bold" style:font-name-asian="Arial-BoldMT" style:font-size-asian="20pt" style:font-weight-asian="bold" style:font-name-complex="Arial-BoldMT" style:font-size-complex="20pt" style:font-weight-complex="bold"/>
    </style:style>
    <style:style style:name="T2" style:family="text">
      <style:text-properties fo:color="#000000" loext:opacity="100%" style:font-name="CanelaText-Regular" fo:font-size="10pt" fo:language="en" fo:country="US" style:font-name-asian="CanelaText-Regular" style:font-size-asian="10pt" style:font-name-complex="CanelaText-Regular" style:font-size-complex="10pt"/>
    </style:style>
    <style:style style:name="T3" style:family="text">
      <style:text-properties fo:color="#000000" loext:opacity="100%" style:font-name="CanelaText-Regular" fo:font-size="10pt" fo:language="en" fo:country="US" officeooo:rsid="0006284a" style:font-name-asian="CanelaText-Regular" style:font-size-asian="10pt" style:font-name-complex="CanelaText-Regular" style:font-size-complex="10pt"/>
    </style:style>
    <style:style style:name="T4" style:family="text">
      <style:text-properties fo:color="#000000" loext:opacity="100%" style:font-name="CanelaText-Regular" fo:font-size="10pt" fo:language="en" fo:country="US" officeooo:rsid="00071221" style:font-name-asian="CanelaText-Regular" style:font-size-asian="10pt" style:font-name-complex="CanelaText-Regular" style:font-size-complex="10pt"/>
    </style:style>
    <style:style style:name="T5" style:family="text">
      <style:text-properties fo:color="#000000" loext:opacity="100%" style:font-name="CanelaText-Regular" fo:font-size="10pt" fo:language="en" fo:country="US" fo:font-weight="bold" style:font-name-asian="CanelaText-Regular" style:font-size-asian="10pt" style:font-weight-asian="bold" style:font-name-complex="CanelaText-Regular" style:font-size-complex="10pt" style:font-weight-complex="bold"/>
    </style:style>
    <style:style style:name="T6" style:family="text">
      <style:text-properties fo:color="#000000" loext:opacity="100%" style:font-name="CanelaText-Regular" fo:font-size="10pt" fo:language="en" fo:country="US" fo:font-weight="bold" officeooo:rsid="0006284a" style:font-name-asian="CanelaText-Regular" style:font-size-asian="10pt" style:font-weight-asian="bold" style:font-name-complex="CanelaText-Regular" style:font-size-complex="10pt" style:font-weight-complex="bold"/>
    </style:style>
    <style:style style:name="T7" style:family="text">
      <style:text-properties fo:color="#000000" loext:opacity="100%" style:font-name="CanelaText-Regular" fo:font-size="10pt" fo:language="en" fo:country="US" fo:font-weight="bold" officeooo:rsid="000bf517" style:font-name-asian="CanelaText-Regular" style:font-size-asian="10pt" style:font-weight-asian="bold" style:font-name-complex="CanelaText-Regular" style:font-size-complex="10pt" style:font-weight-complex="bold"/>
    </style:style>
    <style:style style:name="T8" style:family="text">
      <style:text-properties fo:color="#000000" loext:opacity="100%" style:font-name="CanelaText-Regular" fo:font-size="10pt" fo:language="en" fo:country="US" fo:font-weight="normal" style:font-name-asian="CanelaText-Regular" style:font-size-asian="10pt" style:font-weight-asian="normal" style:font-name-complex="CanelaText-Regular" style:font-size-complex="10pt" style:font-weight-complex="normal"/>
    </style:style>
    <style:style style:name="T9" style:family="text">
      <style:text-properties fo:color="#000000" loext:opacity="100%" style:font-name="CanelaText-Regular" fo:font-size="10pt" fo:language="en" fo:country="US" fo:font-weight="normal" officeooo:rsid="00093345" style:font-name-asian="CanelaText-Regular" style:font-size-asian="10pt" style:font-weight-asian="normal" style:font-name-complex="CanelaText-Regular" style:font-size-complex="10pt" style:font-weight-complex="normal"/>
    </style:style>
    <style:style style:name="T10" style:family="text">
      <style:text-properties fo:color="#000000" loext:opacity="100%" style:font-name="CanelaText-Regular" fo:font-size="10pt" style:font-name-asian="CanelaText-Regular" style:font-size-asian="10pt" style:font-name-complex="CanelaText-Regular" style:font-size-complex="10pt"/>
    </style:style>
    <style:style style:name="T11" style:family="text">
      <style:text-properties fo:color="#000000" loext:opacity="100%" style:font-name="CanelaText-Regular" fo:language="en" fo:country="US" fo:font-weight="bold" style:font-name-asian="CanelaText-Regular" style:font-weight-asian="bold" style:font-name-complex="CanelaText-Regular" style:font-weight-complex="bold"/>
    </style:style>
    <style:style style:name="T12" style:family="text">
      <style:text-properties fo:color="#000000" loext:opacity="100%" style:font-name="CanelaText-Regular" fo:language="en" fo:country="US" style:font-name-asian="CanelaText-Regular" style:font-name-complex="CanelaText-Regular"/>
    </style:style>
    <style:style style:name="T13" style:family="text">
      <style:text-properties fo:color="#000000" loext:opacity="100%" style:font-name="CanelaText-Regular" fo:font-size="8pt" fo:language="en" fo:country="US" style:font-name-asian="CanelaText-Regular" style:font-size-asian="8pt" style:font-name-complex="CanelaText-Regular" style:font-size-complex="8pt"/>
    </style:style>
    <style:style style:name="T14" style:family="text">
      <style:text-properties fo:color="#000000" loext:opacity="100%" style:font-name="CanelaText-Regular" fo:font-size="8pt" fo:language="en" fo:country="US" fo:font-weight="bold" style:font-name-asian="CanelaText-Regular" style:font-size-asian="8pt" style:font-weight-asian="bold" style:font-name-complex="CanelaText-Regular" style:font-size-complex="8pt" style:font-weight-complex="bold"/>
    </style:style>
    <style:style style:name="T15" style:family="text">
      <style:text-properties fo:color="#000000" loext:opacity="100%" style:font-name="CanelaText-Medium" fo:font-size="11pt" fo:language="en" fo:country="US" style:font-name-asian="CanelaText-Medium" style:font-size-asian="11pt" style:font-name-complex="CanelaText-Medium" style:font-size-complex="11pt"/>
    </style:style>
    <style:style style:name="T16" style:family="text">
      <style:text-properties fo:color="#000000" loext:opacity="100%" style:font-name="CanelaText-Medium" fo:font-size="11pt" fo:language="en" fo:country="US" fo:font-weight="bold" style:font-name-asian="CanelaText-Medium" style:font-size-asian="11pt" style:font-weight-asian="bold" style:font-name-complex="CanelaText-Medium" style:font-size-complex="11pt" style:font-weight-complex="bold"/>
    </style:style>
    <style:style style:name="T17" style:family="text">
      <style:text-properties fo:text-transform="uppercase" fo:color="#000000" loext:opacity="100%" style:font-name="CanelaText-Bold" fo:font-size="11pt" fo:language="en" fo:country="US" fo:font-weight="bold" style:font-name-asian="CanelaText-Bold" style:font-size-asian="11pt" style:font-weight-asian="bold" style:font-name-complex="CanelaText-Bold" style:font-size-complex="11pt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font-name="CanelaText-Medium" style:font-name-asian="CanelaText-Medium" style:font-name-complex="CanelaText-Medium"/>
    </style:style>
    <style:style style:name="T20" style:family="text">
      <style:text-properties style:font-name="CanelaText-Medium" fo:font-weight="normal" style:font-name-asian="CanelaText-Medium" style:font-weight-asian="normal" style:font-name-complex="CanelaText-Medium" style:font-weight-complex="normal"/>
    </style:style>
    <text:list-style style:name="L1">
      <text:list-level-style-bullet text:level="1" text:style-name="Bullet_5f_Symbols" loext:num-list-format="%1%" text:bullet-char="">
        <style:list-level-properties text:min-label-width="0.1543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">
        <style:list-level-properties text:min-label-width="0.155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">
        <style:list-level-properties text:min-label-width="0.155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5f_Symbols" loext:num-list-format="%1%" text:bullet-char="">
        <style:list-level-properties text:min-label-width="0.1543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5f_Symbols" loext:num-list-format="%1%" text:bullet-char="">
        <style:list-level-properties text:min-label-width="0.1543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ody Perakslis</text:span></text:p>
      <text:p text:style-name="P18">Skills: <text:span text:style-name="T19">Cloud Backend (AWS); Python, Golang, C/C++, Bash, Swift, Java, Javascript, C; REACT, Functional programming, Docker, Git, Agile Method, LaTex, AI Usage, writing </text:span></text:p>
      <text:p text:style-name="P15">Work Experiences</text:p>
      <text:p text:style-name="P23"><text:span text:style-name="T5">ValidaTek – Software Developer I → Software Developer III <text:tab/> <text:s text:c="21"/></text:span><text:span text:style-name="T8">2021-Present</text:span></text:p>
      <text:p text:style-name="P23"><text:span text:style-name="T8">Worked on a full-stack application, using Spring-boot </text:span><text:span text:style-name="T9">(java)</text:span><text:span text:style-name="T8">, react, and nest-js, hosted on a kubernetes service for DoD DISA.</text:span></text:p>
      <text:p text:style-name="P23"><text:span text:style-name="T8">Took charge of designing a scraper to keep up to date data with an unrelaible data source.</text:span></text:p>
      <text:p text:style-name="P19"><text:span text:style-name="T5">University of Minnesota</text:span><text:span text:style-name="T2"> - </text:span><text:span text:style-name="T5">Edge Computing Researche</text:span><text:span text:style-name="T6">r</text:span><text:span text:style-name="T5"> <text:s text:c="25"/></text:span><text:span text:style-name="T2">May 2019 - Nov 202</text:span><text:span text:style-name="T3">0 </text:span><text:span text:style-name="T2">Design Armada, a decentralized edge computing system for volunteer nodes <text:s text:c="9"/></text:span></text:p>
      <text:p text:style-name="P19"><text:span text:style-name="T2">Write code in Golang utilizing Docker APIs</text:span></text:p>
      <text:p text:style-name="P20"><text:span text:style-name="T5">Kanetus LLC - Technical Co-Founder <text:tab/><text:tab/></text:span><text:span text:style-name="T2"><text:tab/> <text:s text:c="12"/><text:tab/><text:tab/>Jan 2018 - Aug 2019</text:span></text:p>
      <text:list xml:id="list2782967182" text:style-name="L3">
        <text:list-item>
          <text:p text:style-name="P21"><text:span text:style-name="T2">Created audio-touring platform for an iOS app in Swift and android app in Kotlin (</text:span><text:a xlink:type="simple" xlink:href="http://thevoyapp.com/" text:style-name="Internet_20_link" text:visited-style-name="Visited_20_Internet_20_Link">thevoyapp.com</text:a><text:span text:style-name="T2">)</text:span></text:p>
        </text:list-item>
        <text:list-item>
          <text:p text:style-name="P10">Built and maintained backend resources (POSTGIS database, ECS, S3, APIs for the app)</text:p>
        </text:list-item>
        <text:list-item>
          <text:p text:style-name="P10">Managed programming effort, finances, and org structure </text:p>
        </text:list-item>
      </text:list>
      <text:p text:style-name="P20"><text:span text:style-name="T5">SPS Commerce - Cloud Automation Intern <text:s text:c="9"/></text:span><text:span text:style-name="T2"><text:s text:c="14"/><text:tab/> <text:s text:c="12"/><text:tab/>May 2017 - Aug 2018</text:span></text:p>
      <text:list xml:id="list2183356450" text:style-name="L4">
        <text:list-item>
          <text:p text:style-name="P11">Wrote and updated generic task running system on shared AWS ECS cluster</text:p>
        </text:list-item>
        <text:list-item>
          <text:p text:style-name="P11">Set up containerized deployment model for Ansible run on Jenkins</text:p>
        </text:list-item>
        <text:list-item>
          <text:p text:style-name="P11">Setup, tested, deployed, and gave a tech talk on using SonarQube (static code testing system)</text:p>
        </text:list-item>
        <text:list-item>
          <text:p text:style-name="P11">Completed tickets with the Cloud Automation and Cloud Security/Compliance joint team</text:p>
        </text:list-item>
      </text:list>
      <text:p text:style-name="P20"><text:span text:style-name="T5">University of Minnesota - Teaching Assistant for Csci 2021 <text:tab/> <text:s text:c="10"/></text:span><text:span text:style-name="T2">Jan 2018 - May 2018</text:span></text:p>
      <text:list xml:id="list3702014928" text:style-name="L5">
        <text:list-item>
          <text:p text:style-name="P12">Taught and graded Machine Architecture class (C and Assembly code)</text:p>
        </text:list-item>
      </text:list>
      <text:p text:style-name="P20"><text:span text:style-name="T5">Yankton School District - Summer IT Assistant <text:s text:c="23"/></text:span><text:span text:style-name="T2">Summers May 2014 - Aug 2016</text:span><text:span text:style-name="T5"><text:tab/></text:span></text:p>
      <text:p text:style-name="P16">Education<text:tab/><text:tab/><text:tab/><text:tab/><text:tab/><text:tab/><text:tab/><text:tab/> <text:s text:c="6"/></text:p>
      <text:p text:style-name="P19"><text:span text:style-name="T5">University of Minnesota</text:span><text:span text:style-name="T2"> (Twin Cities) </text:span><text:span text:style-name="T5">Bachelors of Science</text:span><text:span text:style-name="T2"> <text:tab/><text:tab/>Minneapolis, MN | </text:span><text:span text:style-name="T10">May 2020</text:span></text:p>
      <text:p text:style-name="P19"><text:span text:style-name="T5">Major:</text:span><text:span text:style-name="T2"> Computer Science <text:s text:c="8"/></text:span><text:span text:style-name="T5">Minor:</text:span><text:span text:style-name="T2"> Mathematics, Philosophy</text:span></text:p>
      <text:p text:style-name="P19"><text:span text:style-name="T5">GPA:</text:span><text:span text:style-name="T2"> 3.894 </text:span><text:span text:style-name="T4">| </text:span><text:span text:style-name="T2">201 credit hours</text:span></text:p>
      <text:p text:style-name="P19"><text:span text:style-name="T7">Notable</text:span><text:span text:style-name="T5">:</text:span><text:span text:style-name="T2"> Machine Learning, Big Data Engineering, Dispersed Data Computing, Spatial Computing </text:span></text:p>
      <text:p text:style-name="P17">Additional Experiences</text:p>
      <text:p text:style-name="P24"><text:span text:style-name="T11"/></text:p>
      <text:p text:style-name="P24"><text:span text:style-name="T11">Leadership</text:span><text:span text:style-name="T12"> <text:s/><text:tab/>President of Philosophy Club (2018-2020); President of Tau Beta Pi (2019-2020); </text:span></text:p>
      <text:p text:style-name="P7"><text:span text:style-name="T13"><text:tab/> <text:s text:c="9"/><text:tab/>Founder of the Cloud Computing Student Group (2017-2019) [</text:span><text:a xlink:type="simple" xlink:href="http://umncloud.com/" text:style-name="Internet_20_link" text:visited-style-name="Visited_20_Internet_20_Link"><text:span text:style-name="T18">umncloud.com</text:span></text:a><text:span text:style-name="T13">]; </text:span></text:p>
      <text:p text:style-name="P13"><text:s text:c="24"/><text:tab/>Coding Club Guru Volunteer (2015-2016) [took over when instructor left];</text:p>
      <text:p text:style-name="P7"><text:span text:style-name="T14">Technical <text:s text:c="4"/><text:tab/></text:span><text:span text:style-name="T13">Minnehack (2020) [</text:span><text:a xlink:type="simple" xlink:href="http://devpost.com/software/socialize" text:style-name="Internet_20_link" text:visited-style-name="Visited_20_Internet_20_Link"><text:span text:style-name="T18">devpost.com/software/socialize</text:span></text:a><text:span text:style-name="T14">]; </text:span></text:p>
      <text:p text:style-name="P7"><text:span text:style-name="T14"><text:tab/> <text:s text:c="9"/><text:tab/>Hack Harvard (2018) [</text:span><text:a xlink:type="simple" xlink:href="http://devpost.com/software/surround-7fyc9t" text:style-name="Internet_20_link" text:visited-style-name="Visited_20_Internet_20_Link"><text:span text:style-name="T18">devpost.com/software/surround-7fyc9t</text:span></text:a><text:span text:style-name="T14">];</text:span></text:p>
      <text:p text:style-name="P7"><text:span text:style-name="T14"><text:tab/><text:tab/>VM Handoff (2018) [</text:span><text:a xlink:type="simple" xlink:href="http://overleaf.com/read/hsxvgrhdphpm" text:style-name="Internet_20_link" text:visited-style-name="Visited_20_Internet_20_Link"><text:span text:style-name="T18">overleaf.com/read/hsxvgrhdphpm</text:span></text:a><text:span text:style-name="T14">]; </text:span></text:p>
      <text:p text:style-name="P7"><text:span text:style-name="T14"><text:tab/><text:tab/>Sentiment Analysis (2018) [</text:span><text:a xlink:type="simple" xlink:href="http://github.com/CalvinRoth/NLPSentiment" text:style-name="Internet_20_link" text:visited-style-name="Visited_20_Internet_20_Link"><text:span text:style-name="T18">github.com/CalvinRoth/NLPSentiment</text:span></text:a><text:span text:style-name="T14">];</text:span></text:p>
      <text:p text:style-name="P14">Awards</text:p>
      <text:p text:style-name="P9">U-Spatial Mapping Grand Prize Winner (2019); American Public Media Horizon Fund (2019); </text:p>
      <text:p text:style-name="P9">CSE 50th Anniversary Student Speaker (2019); Target Security Scholarship Winner (2019); </text:p>
      <text:p text:style-name="P9">Minnedemo 30 Presenter (2018); Holme’s Center Biz Pitch Finalist (2018); </text:p>
      <text:p text:style-name="P7"><text:span text:style-name="T2">tBRS Innovation Award Winner (2017); Dean’s List (2016 - 2020); National Merit Scholarship (2016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-BoldMT" svg:font-family="Arial-BoldMT"/>
    <style:font-face style:name="CanelaText-Bold" svg:font-family="CanelaText-Bold"/>
    <style:font-face style:name="CanelaText-Medium" svg:font-family="CanelaText-Medium"/>
    <style:font-face style:name="CanelaText-Regular" svg:font-family="CanelaText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5f_Symbols" style:display-name="Bullet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7-06T07:45:03.605953876</dc:date>
    <meta:editing-duration>PT20M58S</meta:editing-duration>
    <meta:editing-cycles>11</meta:editing-cycles>
    <meta:document-statistic meta:table-count="0" meta:image-count="0" meta:object-count="0" meta:page-count="1" meta:paragraph-count="38" meta:word-count="384" meta:character-count="2906" meta:non-whitespace-character-count="2322"/>
  </office:meta>
</office:document-meta>
</file>